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INSTALACIÓN DUAL WINDOWS-LINUX</text:span></text:p>
      <text:p text:style-name="P1"><text:span text:style-name="T3">1- Se abre VirtualBOX y se le da al botón NUEVA</text:span></text:p>
      <text:p text:style-name="P1"><text:span text:style-name="T3">2- Se le da un nombre a la máquina virtual, se selecciona la ISO del sistema operativo que quieres instalar y se pulsa en siguiente</text:span></text:p>
      <text:p text:style-name="P1"><draw:frame text:anchor-type="as-char" svg:width="146.58mm" svg:height="110.60mm" style:rel-width="scale" style:rel-height="scale"><draw:object-ole xlink:href="OleObj1"/><draw:image xlink:href="ObjectReplacements/OleObj1"/></draw:frame><text:span text:style-name="T3"/></text:p>
      <text:p text:style-name="P1"><text:span text:style-name="T3">3- Se selecciona la cantidad de memoria RAM y Procesadores que se quieren utilizar y se pulsa siguiente</text:span></text:p>
      <text:p text:style-name="P1"><draw:frame text:anchor-type="as-char" svg:width="146.58mm" svg:height="75.41mm" style:rel-width="scale" style:rel-height="scale"><draw:object-ole xlink:href="OleObj2"/><draw:image xlink:href="ObjectReplacements/OleObj2"/></draw:frame><text:span text:style-name="T3"/></text:p>
      <text:p text:style-name="P1"><text:span text:style-name="T3">4- En esta ventana nos sale la opción de poder crear un disco duro virtual pudiendo elegir el tampo del mismo, un disco duro virtual existente o no añadir un disco duro virtual. </text:span></text:p>
      <text:p text:style-name="P1"><text:span text:style-name="T3">5- A continuación pulsamos siguiente.</text:span></text:p>
      <text:p text:style-name="P1"><draw:frame text:anchor-type="as-char" svg:width="146.58mm" svg:height="74.88mm" style:rel-width="scale" style:rel-height="scale"><draw:object-ole xlink:href="OleObj3"/><draw:image xlink:href="ObjectReplacements/OleObj3"/></draw:frame><text:span text:style-name="T3"/></text:p>
      <text:p text:style-name="P1"><text:span text:style-name="T3">6- En la última ventana sale un resúmen de las opciones que hemos elegido. Se pulsa Terminar para crear la máquina virtual.</text:span></text:p>
      <text:p text:style-name="P1"><draw:frame text:anchor-type="as-char" svg:width="146.58mm" svg:height="75.41mm" style:rel-width="scale" style:rel-height="scale"><draw:object-ole xlink:href="OleObj4"/><draw:image xlink:href="ObjectReplacements/OleObj4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